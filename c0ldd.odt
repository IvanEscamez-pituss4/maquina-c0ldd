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B2000002212824C5DC.png" manifest:media-type="image/png"/>
  <manifest:file-entry manifest:full-path="Pictures/100000010000076F00000385FDD40BF9.png" manifest:media-type="image/png"/>
  <manifest:file-entry manifest:full-path="Pictures/100000010000079D0000073017B84B49.png" manifest:media-type="image/png"/>
  <manifest:file-entry manifest:full-path="Pictures/10000001000006F20000056224A58A8D.png" manifest:media-type="image/png"/>
  <manifest:file-entry manifest:full-path="Pictures/1000000100000562000003DE6DF9364C.png" manifest:media-type="image/png"/>
  <manifest:file-entry manifest:full-path="Pictures/1000000100000512000004348B803A3E.png" manifest:media-type="image/png"/>
  <manifest:file-entry manifest:full-path="Pictures/10000001000002B4000001D93F104B10.png" manifest:media-type="image/png"/>
  <manifest:file-entry manifest:full-path="Pictures/100000010000029E000001E5B9C1061A.png" manifest:media-type="image/png"/>
  <manifest:file-entry manifest:full-path="Pictures/10000001000002E9000004C68C490BEF.png" manifest:media-type="image/png"/>
  <manifest:file-entry manifest:full-path="Pictures/100000010000069B0000032C4C1978C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>
      <style:paragraph-properties fo:margin-left="0cm" fo:margin-right="0cm" fo:text-indent="0cm"/>
      <style:text-properties style:font-family-generic="roman" fo:font-size="12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family-generic="roman" fo:font-size="12pt" fo:font-style="normal" fo:text-shadow="none" style:text-underline-style="none" fo:font-weight="bold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 style:parent-style-name="Heading_20_1">
      <style:text-properties officeooo:paragraph-rsid="00075ff5"/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paragraph-rsid="00075ff5"/>
    </style:style>
    <style:style style:name="P7" style:family="paragraph" style:parent-style-name="Text_20_body">
      <style:text-properties fo:font-size="18pt" officeooo:rsid="00075ff5" style:font-size-asian="18pt" style:font-size-complex="18pt"/>
    </style:style>
    <style:style style:name="P8" style:family="paragraph" style:parent-style-name="Text_20_body">
      <style:text-properties fo:font-size="18pt" officeooo:rsid="00075ff5" officeooo:paragraph-rsid="00075ff5" style:font-size-asian="18pt" style:font-size-complex="18pt"/>
    </style:style>
    <style:style style:name="P9" style:family="paragraph" style:parent-style-name="Heading_20_2">
      <style:paragraph-properties fo:margin-top="0cm" fo:margin-bottom="0.247cm" style:contextual-spacing="false" fo:line-height="115%"/>
    </style:style>
    <style:style style:name="P10" style:family="paragraph" style:parent-style-name="Heading_20_3">
      <style:paragraph-properties fo:margin-top="0cm" fo:margin-bottom="0.247cm" style:contextual-spacing="false" fo:line-height="115%"/>
    </style:style>
    <style:style style:name="P11" style:family="paragraph" style:parent-style-name="Text_20_body">
      <style:text-properties officeooo:paragraph-rsid="00060113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Quotations">
      <style:paragraph-properties fo:margin-top="0cm" fo:margin-bottom="0.247cm" style:contextual-spacing="false" fo:line-height="115%"/>
    </style:style>
    <style:style style:name="P15" style:family="paragraph" style:parent-style-name="Text_20_body">
      <style:paragraph-properties fo:margin-top="0cm" fo:margin-bottom="0.247cm" style:contextual-spacing="false" fo:line-height="115%"/>
    </style:style>
    <style:style style:name="P16" style:family="paragraph" style:parent-style-name="Text_20_body" style:list-style-name="L3"/>
    <style:style style:name="P17" style:family="paragraph" style:parent-style-name="Text_20_body" style:list-style-name="L4"/>
    <style:style style:name="P18" style:family="paragraph" style:parent-style-name="Text_20_body" style:list-style-name="L5">
      <style:text-properties fo:font-weight="bold"/>
    </style:style>
    <style:style style:name="P19" style:family="paragraph" style:parent-style-name="Text_20_body" style:list-style-name="L5"/>
    <style:style style:name="P20" style:family="paragraph" style:parent-style-name="Preformatted_20_Text" style:list-style-name="L5">
      <style:paragraph-properties fo:margin-top="0cm" fo:margin-bottom="0.247cm" style:contextual-spacing="false" fo:line-height="115%"/>
    </style:style>
    <style:style style:name="P21" style:family="paragraph" style:parent-style-name="Text_20_body">
      <style:text-properties officeooo:paragraph-rsid="00071825"/>
    </style:style>
    <style:style style:name="P22" style:family="paragraph" style:parent-style-name="Text_20_body" style:list-style-name="L6"/>
    <style:style style:name="P23" style:family="paragraph" style:parent-style-name="Text_20_body" style:list-style-name="L7"/>
    <style:style style:name="P24" style:family="paragraph" style:parent-style-name="Text_20_body" style:list-style-name="L8"/>
    <style:style style:name="P25" style:family="paragraph" style:parent-style-name="Text_20_body">
      <style:text-properties style:text-underline-style="solid" style:text-underline-width="auto" style:text-underline-color="font-color" officeooo:rsid="00075ff5" officeooo:paragraph-rsid="00075ff5"/>
    </style:style>
    <style:style style:name="P26" style:family="paragraph" style:parent-style-name="Text_20_body" style:list-style-name="L9"/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Gentium Book Basic'" style:font-pitch="variable" fo:font-size="24pt" fo:font-style="normal" fo:text-shadow="none" style:text-underline-style="none" fo:font-weight="bold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officeooo:rsid="00060113"/>
    </style:style>
    <style:style style:name="T4" style:family="text">
      <style:text-properties fo:color="#c9211e" loext:opacity="100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loext:opacity="100%" fo:font-weight="normal" style:font-weight-asian="normal" style:font-weight-complex="normal"/>
    </style:style>
    <style:style style:name="T7" style:family="text">
      <style:text-properties fo:color="#000000" loext:opacity="100%" fo:font-weight="normal" officeooo:rsid="00064dad" style:font-weight-asian="normal" style:font-weight-complex="normal"/>
    </style:style>
    <style:style style:name="T8" style:family="text">
      <style:text-properties officeooo:rsid="00071825"/>
    </style:style>
    <style:style style:name="T9" style:family="text">
      <style:text-properties fo:color="#c9211e" loext:opacity="100%" style:text-underline-style="solid" style:text-underline-width="auto" style:text-underline-color="font-color" officeooo:rsid="00071825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color="#c9211e" loext:opacity="100%"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-0.205cm, 14.469cm, 18.86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895cm, 2.528cm, 17.01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24.899cm, 4.632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stroke="solid" draw:stroke-dash="Ultrafine_20_Dashed" svg:stroke-width="0.081cm" svg:stroke-color="#3465a4" draw:marker-start="" draw:marker-start-width="0.383cm" draw:marker-start-center="false" draw:marker-end="" draw:marker-end-width="0.383cm" draw:marker-end-center="false" draw:stroke-linejoin="round" svg:stroke-linecap="round" draw:fill="none" draw:fill-color="#ffffff" draw:textarea-horizontal-align="center" draw:textarea-vertical-align="middle" draw:auto-grow-height="false" draw:fit-to-size="false" style:shrink-to-fit="false" fo:min-height="7.172cm" fo:min-width="13.677cm" fo:padding-top="0.159cm" fo:padding-bottom="0.159cm" fo:padding-left="0.279cm" fo:padding-right="0.279cm" fo:wrap-option="wrap" draw:shadow="visible" draw:shadow-offset-x="0.106cm" draw:shadow-offset-y="0.106cm" draw:shadow-color="#3465a4" draw:shadow-opacity="20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draw:stroke-dash="Ultrafine_20_Dashed" svg:stroke-width="0.081cm" svg:stroke-color="#3465a4" draw:marker-start="" draw:marker-start-width="0.383cm" draw:marker-start-center="false" draw:marker-end="" draw:marker-end-width="0.383cm" draw:marker-end-center="false" draw:stroke-linejoin="round" svg:stroke-linecap="round" draw:fill="none" draw:fill-color="#ffffff" draw:textarea-horizontal-align="center" draw:textarea-vertical-align="middle" draw:auto-grow-height="false" draw:fit-to-size="false" style:shrink-to-fit="false" fo:min-height="7.172cm" fo:min-width="13.677cm" fo:padding-top="0.159cm" fo:padding-bottom="0.159cm" fo:padding-left="0.279cm" fo:padding-right="0.279cm" fo:wrap-option="wrap" draw:shadow="visible" draw:shadow-offset-x="0.106cm" draw:shadow-offset-y="0.106cm" draw:shadow-color="#3465a4" draw:shadow-opacity="20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custom-shape text:anchor-type="paragraph" draw:z-index="0" draw:name="Fontwork 1" draw:style-name="gr2" draw:text-style-name="P2" svg:width="14.235cm" svg:height="7.488cm" svg:x="1.983cm" svg:y="-1.24cm"><text:p text:style-name="P1"><text:span text:style-name="T1">Informe</text:span></text:p><text:p text:style-name="P1"><text:span text:style-name="T1"><text:s/>de </text:span></text:p><text:p text:style-name="P1"><text:span text:style-name="T1">ColddBox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13.0452288283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" text:outline-level="1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Sumario</text:p>
          </text:index-title>
          <text:p text:style-name="P4"><text:a xlink:type="simple" xlink:href="#__RefHeading___Toc6018_912096607" office:name="1. Resumen" text:style-name="Index_20_Link" text:visited-style-name="Index_20_Link">1. Resumen<text:tab/>2</text:a></text:p>
          <text:p text:style-name="P4"><text:a xlink:type="simple" xlink:href="#__RefHeading___Toc6020_912096607" office:name="2. Fase de Reconocimiento y Descubrimiento" text:style-name="Index_20_Link" text:visited-style-name="Index_20_Link">2. Fase de Reconocimiento y Descubrimiento<text:tab/>2</text:a></text:p>
          <text:p text:style-name="P5"><text:a xlink:type="simple" xlink:href="#__RefHeading___Toc6022_912096607" office:name="2.1 Escaneo de Puertos (Nmap)" text:style-name="Index_20_Link" text:visited-style-name="Index_20_Link">2.1 Escaneo de Puertos (Nmap)<text:tab/>2</text:a></text:p>
          <text:p text:style-name="P5"><text:a xlink:type="simple" xlink:href="#__RefHeading___Toc6024_912096607" office:name="2.2 Descubrimiento de Directorios (Gobuster)" text:style-name="Index_20_Link" text:visited-style-name="Index_20_Link">2.2 Descubrimiento de Directorios (Gobuster)<text:tab/>3</text:a></text:p>
          <text:p text:style-name="P4"><text:a xlink:type="simple" xlink:href="#__RefHeading___Toc6026_912096607" office:name="3. Fase de Intrusión" text:style-name="Index_20_Link" text:visited-style-name="Index_20_Link">3. Fase de Intrusión<text:tab/>4</text:a></text:p>
          <text:p text:style-name="P5"><text:a xlink:type="simple" xlink:href="#__RefHeading___Toc6028_912096607" office:name="3.1 Ingeniería Social y Pistas" text:style-name="Index_20_Link" text:visited-style-name="Index_20_Link">3.1 Ingeniería Social y Pistas<text:tab/>4</text:a></text:p>
          <text:p text:style-name="P5"><text:a xlink:type="simple" xlink:href="#__RefHeading___Toc6030_912096607" office:name="3.2 Ataque de Fuerza Bruta (WPScan)" text:style-name="Index_20_Link" text:visited-style-name="Index_20_Link">3.2 Ataque de Fuerza Bruta (WPScan)<text:tab/>5</text:a></text:p>
          <text:p text:style-name="P4"><text:a xlink:type="simple" xlink:href="#__RefHeading___Toc6032_912096607" office:name="4. Obtención de Reverse Shell" text:style-name="Index_20_Link" text:visited-style-name="Index_20_Link">4. Obtención de Reverse Shell<text:tab/>6</text:a></text:p>
          <text:p text:style-name="P5"><text:a xlink:type="simple" xlink:href="#__RefHeading___Toc6034_912096607" office:name="4.1 El problema de seguridad de WordPress" text:style-name="Index_20_Link" text:visited-style-name="Index_20_Link">4.1 El problema de seguridad de WordPress<text:tab/>6</text:a></text:p>
          <text:p text:style-name="P5"><text:a xlink:type="simple" xlink:href="#__RefHeading___Toc6036_912096607" office:name="4.2 El truco del &quot;Theme Editor&quot;" text:style-name="Index_20_Link" text:visited-style-name="Index_20_Link">4.2 El truco del "Theme Editor"<text:tab/>7</text:a></text:p>
          <text:p text:style-name="P5"><text:a xlink:type="simple" xlink:href="#__RefHeading___Toc6038_912096607" office:name="4.3 Ejecución y Conexión" text:style-name="Index_20_Link" text:visited-style-name="Index_20_Link">4.3 Ejecución y Conexión<text:tab/>7</text:a></text:p>
          <text:p text:style-name="P4"><text:a xlink:type="simple" xlink:href="#__RefHeading___Toc6040_912096607" office:name="5. Escalada de Privilegios (Root)" text:style-name="Index_20_Link" text:visited-style-name="Index_20_Link">5. Escalada de Privilegios (Root)<text:tab/>8</text:a></text:p>
          <text:p text:style-name="P5"><text:a xlink:type="simple" xlink:href="#__RefHeading___Toc6042_912096607" office:name="5.1 Enumeración Interna (SUID)" text:style-name="Index_20_Link" text:visited-style-name="Index_20_Link">5.1 Enumeración Interna (SUID)<text:tab/>8</text:a></text:p>
          <text:p text:style-name="P5"><text:a xlink:type="simple" xlink:href="#__RefHeading___Toc6044_912096607" office:name="5.2 El final a Root" text:style-name="Index_20_Link" text:visited-style-name="Index_20_Link">5.2 El final a Root<text:tab/>8</text:a></text:p>
          <text:p text:style-name="P4"><text:a xlink:type="simple" xlink:href="#__RefHeading___Toc6046_912096607" office:name="6. Conclusión y Recomendaciones" text:style-name="Index_20_Link" text:visited-style-name="Index_20_Link">6. Conclusión y Recomendaciones<text:tab/>10</text:a></text:p>
        </text:index-body>
      </text:table-of-content>
      <text:p text:style-name="P6"/>
      <text:p text:style-name="Text_20_body"/>
      <text:p text:style-name="Text_20_body"/>
      <text:p text:style-name="P7"/>
      <text:p text:style-name="P8">Ivan Escamez</text:p>
      <text:p text:style-name="P8"><text:a xlink:type="simple" xlink:href="http://www.4geeks.com/" text:style-name="Internet_20_link" text:visited-style-name="Visited_20_Internet_20_Link">www.4geeks.com</text:a></text:p>
      <text:h text:style-name="Heading_20_2" text:outline-level="2"><text:bookmark-start text:name="__RefHeading___Toc6018_912096607"/><text:soft-page-break/>1. Resumen<text:bookmark-end text:name="__RefHeading___Toc6018_912096607"/></text:h>
      <text:p text:style-name="Text_20_body">Este informe detalla el proceso de una "prueba de penetración" realizada sobre <text:span text:style-name="T2">ColddBox</text:span>. El objetivo era un error de configuración del sistema <text:span text:style-name="T3">que </text:span>permiten a un atacante externo tomar el control total.</text:p>
      <text:p text:style-name="Text_20_body">Descubrimos una nota oculta, usamos esa información para entrar en la web de WordPress, inyectamos un código para controlar el servidor desde nuestra terminal y finalmente aprovechamos un comando con permisos especiales para convertirnos en el usuario <text:span text:style-name="T2">Root</text:span> (el dueño absoluto).</text:p>
      <text:h text:style-name="P9" text:outline-level="2"/>
      <text:h text:style-name="P9" text:outline-level="2"><text:bookmark-start text:name="__RefHeading___Toc6020_912096607"/>2. Fase de Reconocimiento y Descubrimiento<text:bookmark-end text:name="__RefHeading___Toc6020_912096607"/></text:h>
      <text:h text:style-name="P10" text:outline-level="3"><text:bookmark-start text:name="__RefHeading___Toc6022_912096607"/>2.1 Escaneo de Puertos (Nmap)<text:bookmark-end text:name="__RefHeading___Toc6022_912096607"/></text:h>
      <text:p text:style-name="P11">Empezamos analizando la máquina <text:span text:style-name="T3">de red viendo que es (10.0.2.19)</text:span> <text:span text:style-name="T3">y </text:span>para ver qué "puertas" (servicios) tenía abiertas.</text:p>
      <text:list text:style-name="L1">
        <text:list-item>
          <text:p text:style-name="P12"><text:span text:style-name="T2">Herramienta:</text:span> <text:span text:style-name="Source_20_Text"><text:span text:style-name="T4">nmap 10.0.2.19 </text:span></text:span></text:p>
        </text:list-item>
        <text:list-item>
          <text:p text:style-name="P12"><draw:frame draw:style-name="fr1" draw:name="Imagen1" text:anchor-type="char" svg:x="-0.106cm" svg:y="1.058cm" svg:width="17cm" svg:height="13.427cm" draw:z-index="1"><draw:image xlink:href="Pictures/10000001000002B2000002212824C5DC.png" xlink:type="simple" xlink:show="embed" xlink:actuate="onLoad" draw:mime-type="image/png"/></draw:frame>El puerto <text:span text:style-name="T5">80 (HTTP)</text:span> estaba abierto, lo que indicaba que había una página web funcionando.</text:p>
        </text:list-item>
      </text:list>
      <text:h text:style-name="P10" text:outline-level="3"><text:soft-page-break/></text:h>
      <text:h text:style-name="P10" text:outline-level="3"><text:bookmark-start text:name="__RefHeading___Toc6024_912096607"/>2.2 Descubrimiento de Directorios (Gobuster)<text:bookmark-end text:name="__RefHeading___Toc6024_912096607"/></text:h>
      <text:p text:style-name="Text_20_body"/>
      <text:p text:style-name="Text_20_body">Usamos <text:span text:style-name="T2">Gobuster</text:span> para buscar carpetas que no estuvieran a la vista en el menú de la web.</text:p>
      <text:list text:style-name="L2">
        <text:list-item>
          <text:p text:style-name="P13"><text:span text:style-name="T2">Comando:</text:span> <text:span text:style-name="Source_20_Text"><text:span text:style-name="T4">gobuster dir -u http://10.0.2.19 -w /usr/share/wordlists/dirb/common.txt</text:span></text:span></text:p>
        </text:list-item>
        <text:list-item>
          <text:p text:style-name="P13">Encontramos una carpeta llamada <text:span text:style-name="Source_20_Text"><text:span text:style-name="T4">/hidden/</text:span></text:span><text:span text:style-name="T4">.</text:span></text:p>
        </text:list-item>
      </text:list>
      <text:p text:style-name="P14"><draw:frame draw:style-name="fr2" draw:name="Imagen29" text:anchor-type="char" svg:width="15cm" svg:height="15.949cm" draw:z-index="2"><draw:image xlink:href="Pictures/100000010000079D0000073017B84B49.png" xlink:type="simple" xlink:show="embed" xlink:actuate="onLoad" draw:mime-type="image/png"/></draw:frame></text:p>
      <text:h text:style-name="P9" text:outline-level="2"/>
      <text:p text:style-name="P15"/>
      <text:p text:style-name="P15"><text:soft-page-break/></text:p>
      <text:h text:style-name="P9" text:outline-level="2"/>
      <text:h text:style-name="P9" text:outline-level="2"><text:bookmark-start text:name="__RefHeading___Toc6026_912096607"/>3. Fase de Intrusión<text:bookmark-end text:name="__RefHeading___Toc6026_912096607"/></text:h>
      <text:h text:style-name="P10" text:outline-level="3"/>
      <text:h text:style-name="P10" text:outline-level="3"><text:bookmark-start text:name="__RefHeading___Toc6028_912096607"/>3.1 Ingeniería Social y Pistas<text:bookmark-end text:name="__RefHeading___Toc6028_912096607"/></text:h>
      <text:p text:style-name="Text_20_body"/>
      <text:p text:style-name="Text_20_body">Al entrar en <text:span text:style-name="Source_20_Text"><text:span text:style-name="T4">http://10.0.2.19/hidden/</text:span></text:span>, encontramos una página simple con una nota de un usuario llamado <text:span text:style-name="T2">Philip</text:span>.</text:p>
      <text:list text:style-name="L3">
        <text:list-item>
          <text:p text:style-name="P16"><text:span text:style-name="T2">Contenido:</text:span><text:span text:style-name="T5"> Philip</text:span> le pedía a un tal <text:span text:style-name="T2">C0ldd</text:span> que le diera la nueva contraseña de <text:span text:style-name="T2">Hugo</text:span>.</text:p>
        </text:list-item>
        <text:list-item>
          <text:p text:style-name="P16"><text:span text:style-name="T2">Importancia:</text:span> Esto es "oro" para un auditor, porque ya sabemos los nombres de los tres usuarios reales del servidor:<text:span text:style-name="T5"> </text:span><text:span text:style-name="Source_20_Text"><text:span text:style-name="T5">philip</text:span></text:span><text:span text:style-name="T5">, </text:span><text:span text:style-name="Source_20_Text"><text:span text:style-name="T5">c0ldd</text:span></text:span><text:span text:style-name="T5"> y </text:span><text:span text:style-name="Source_20_Text"><text:span text:style-name="T5">hugo</text:span></text:span>.<draw:frame draw:style-name="fr1" draw:name="Imagen30" text:anchor-type="char" svg:x="0.333cm" svg:y="1.334cm" svg:width="17.466cm" svg:height="12.547cm" draw:z-index="3"><draw:image xlink:href="Pictures/1000000100000562000003DE6DF9364C.png" xlink:type="simple" xlink:show="embed" xlink:actuate="onLoad" draw:mime-type="image/png"/></draw:frame></text:p>
        </text:list-item>
      </text:list>
      <text:h text:style-name="P10" text:outline-level="3"/>
      <text:p text:style-name="P15"/>
      <text:p text:style-name="P15"/>
      <text:p text:style-name="P15"><text:soft-page-break/></text:p>
      <text:p text:style-name="P15"/>
      <text:h text:style-name="P10" text:outline-level="3"><text:bookmark-start text:name="__RefHeading___Toc6030_912096607"/>3.2 Ataque de Fuerza Bruta (WPScan)<text:bookmark-end text:name="__RefHeading___Toc6030_912096607"/></text:h>
      <text:p text:style-name="Text_20_body">Sabiendo que <text:span text:style-name="Source_20_Text"><text:span text:style-name="T5">c0ldd</text:span></text:span> es el administrador, lanzamos un ataque para adivinar su contraseña usando un diccionario de palabras comunes llamado <text:span text:style-name="Source_20_Text"><text:span text:style-name="T4">rockyou.txt,</text:span></text:span><text:span text:style-name="Source_20_Text"><text:span text:style-name="T6"> </text:span></text:span><text:span text:style-name="Source_20_Text"><text:span text:style-name="T7">ya que hydra no nos funciona</text:span></text:span><text:span text:style-name="T6">.</text:span></text:p>
      <text:list text:style-name="L4">
        <text:list-item>
          <text:p text:style-name="P17"><text:span text:style-name="T2">Herramienta:</text:span><text:span text:style-name="T4"> </text:span><text:span text:style-name="Source_20_Text"><text:span text:style-name="T4">wpscan --url http://10.0.2.19 --usernames c0ldd --passwords /usr/share/wordlists/rockyou.txt</text:span></text:span></text:p>
          <text:p text:style-name="P17"><text:span text:style-name="Source_20_Text"><text:span text:style-name="T4"/></text:span></text:p>
        </text:list-item>
        <text:list-item>
          <text:p text:style-name="P17">Encontramos la contraseña (<text:span text:style-name="Source_20_Text">cybersecurity</text:span>) y logramos entrar al panel de administración <text:span text:style-name="Source_20_Text">/wp-admin</text:span>.</text:p>
        </text:list-item>
      </text:list>
      <text:h text:style-name="Heading_20_3" text:outline-level="3"/>
      <text:p text:style-name="Text_20_body">Para tener el control total, necesitábamos la cuenta de administrador: <text:span text:style-name="Source_20_Text">c0ldd</text:span>. Probamos de nuevo <text:s/>cambia<text:span text:style-name="T8">ndo </text:span>y decidimos usar <text:span text:style-name="T2">Hydra</text:span>, una herramienta de fuerza bruta mucho más potente y agresiva, configurada para atacar directamente el formulario de login.</text:p>
      <text:list text:style-name="L5">
        <text:list-item>
          <text:p text:style-name="P18">El Ataque con Hydra:</text:p>
          <text:list>
            <text:list-item>
              <text:p text:style-name="P19"><text:span text:style-name="T2">Comando Utilizado:</text:span></text:p>
              <text:p text:style-name="P20"><text:span text:style-name="Source_20_Text"><text:span text:style-name="T4">hydra -l c0ldd -P /usr/share/wordlists/rockyou.txt 10.0.2.19 http-form-post '/wp-login.php:log=^USER^&amp;pwd=^PASS^&amp;wp-submit=Log+In:F=The password you entered for the username'</text:span></text:span></text:p>
            </text:list-item>
          </text:list>
        </text:list-item>
      </text:list>
      <text:p text:style-name="Text_20_body"><draw:frame draw:style-name="fr3" draw:name="Imagen31" text:anchor-type="char" svg:width="17cm" svg:height="8.049cm" draw:z-index="4"><draw:image xlink:href="Pictures/100000010000076F00000385FDD40BF9.png" xlink:type="simple" xlink:show="embed" xlink:actuate="onLoad" draw:mime-type="image/png"/></draw:frame></text:p>
      <text:p text:style-name="P21"><text:span text:style-name="T8">Confirmando la contraseña: </text:span><text:span text:style-name="T9">9876543210</text:span></text:p>
      <text:p text:style-name="Text_20_body"><text:soft-page-break/></text:p>
      <text:h text:style-name="P9" text:outline-level="2"><text:bookmark-start text:name="__RefHeading___Toc6032_912096607"/>4. Obtención de Reverse Shell<text:bookmark-end text:name="__RefHeading___Toc6032_912096607"/></text:h>
      <text:p text:style-name="P15"/>
      <text:h text:style-name="P10" text:outline-level="3"><text:bookmark-start text:name="__RefHeading___Toc6034_912096607"/>4.1 El problema de seguridad de WordPress<text:bookmark-end text:name="__RefHeading___Toc6034_912096607"/></text:h>
      <text:p text:style-name="Text_20_body">Intentamos subir nuestra "Reverse Shell" (un código que nos permite manejar la consola del servidor) a través del menú de fotos/plugins, pero WordPress bloqueaba los archivos <text:span text:style-name="Source_20_Text">.php</text:span> por seguridad.</text:p>
      <text:p text:style-name="Text_20_body"/>
      <text:h text:style-name="P10" text:outline-level="3"><text:bookmark-start text:name="__RefHeading___Toc6036_912096607"/>4.2 El truco del "Theme Editor"<text:bookmark-end text:name="__RefHeading___Toc6036_912096607"/></text:h>
      <text:p text:style-name="Text_20_body">Para saltarnos esta restricción, usamos una función de administrador: el <text:span text:style-name="T2">Editor de Temas</text:span>.</text:p>
      <text:list text:style-name="L6">
        <text:list-item>
          <text:p text:style-name="P22">Fuimos a <text:span text:style-name="T2">Appearance &gt; Theme Editor</text:span>.</text:p>
        </text:list-item>
        <text:list-item>
          <text:p text:style-name="P22">Elegimos el archivo <text:span text:style-name="Source_20_Text"><text:span text:style-name="T2">404.php</text:span></text:span> del tema activo.</text:p>
        </text:list-item>
        <text:list-item>
          <text:p text:style-name="P22">Borramos el código original y pegamos nuestra shell configurada con nuestra IP de Kali (<text:span text:style-name="Source_20_Text">10.0.2.4</text:span>) y el puerto <text:span text:style-name="Source_20_Text">4444</text:span>.</text:p>
          <text:p text:style-name="P22"><draw:frame draw:style-name="fr4" draw:name="Imagen32" text:anchor-type="char" svg:x="-1.318cm" svg:y="0.085cm" svg:width="9.403cm" svg:height="4.641cm" draw:z-index="5"><draw:image xlink:href="Pictures/1000000100000512000004348B803A3E.png" xlink:type="simple" xlink:show="embed" xlink:actuate="onLoad" draw:mime-type="image/png"/></draw:frame><draw:frame draw:style-name="fr1" draw:name="Imagen33" text:anchor-type="char" svg:x="7.504cm" svg:y="0.159cm" svg:width="10.816cm" svg:height="15.353cm" draw:z-index="6"><draw:image xlink:href="Pictures/10000001000002E9000004C68C490BEF.png" xlink:type="simple" xlink:show="embed" xlink:actuate="onLoad" draw:mime-type="image/png"/></draw:frame>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0" text:outline-level="3"><text:bookmark-start text:name="__RefHeading___Toc6038_912096607"/><text:soft-page-break/>4.3 Ejecución y Conexión<text:bookmark-end text:name="__RefHeading___Toc6038_912096607"/></text:h>
      <text:p text:style-name="Text_20_body">Preparamos nuestra terminal en Kali con <text:span text:style-name="T2">Netcat</text:span> <text:span text:style-name="Source_20_Text"><text:span text:style-name="T4">nc -lvnp 4444</text:span></text:span> y visitamos la URL del archivo modificado. Inmediatamente, el servidor nos envió una terminal de comandos.</text:p>
      <text:p text:style-name="P14"><draw:frame draw:style-name="fr5" draw:name="Imagen34" text:anchor-type="char" svg:x="0.859cm" svg:y="0.236cm" svg:width="14.194cm" svg:height="5.752cm" draw:z-index="7"><draw:image xlink:href="Pictures/10000001000006F20000056224A58A8D.png" xlink:type="simple" xlink:show="embed" xlink:actuate="onLoad" draw:mime-type="image/png"/></draw:frame></text:p>
      <text:p text:style-name="P14"/>
      <text:h text:style-name="P9" text:outline-level="2"><text:bookmark-start text:name="__RefHeading___Toc6040_912096607"/>5. Escalada de Privilegios (Root)<text:bookmark-end text:name="__RefHeading___Toc6040_912096607"/></text:h>
      <text:h text:style-name="P10" text:outline-level="3"><text:bookmark-start text:name="__RefHeading___Toc6042_912096607"/>5.1 Enumeración Interna (SUID)<text:bookmark-end text:name="__RefHeading___Toc6042_912096607"/></text:h>
      <text:p text:style-name="Text_20_body">Una vez dentro, éramos un usuario con pocos permisos (<text:span text:style-name="Source_20_Text"><text:span text:style-name="T4">www-data</text:span></text:span>). Buscamos archivos con el bit <text:span text:style-name="T2">SUID</text:span> (programas que se ejecutan como root aunque los use un usuario normal).</text:p>
      <text:list text:style-name="L7">
        <text:list-item>
          <text:p text:style-name="P23"><text:span text:style-name="T2">Comando:</text:span> <text:span text:style-name="Source_20_Text"><text:span text:style-name="T4">find / -perm -u=s -type f 2&gt;/dev/null</text:span></text:span></text:p>
        </text:list-item>
        <text:list-item>
          <text:p text:style-name="P23"><text:span text:style-name="T2">Vulnerabilidad:</text:span> Encontramos que el comando <text:span text:style-name="Source_20_Text"><text:span text:style-name="T4">/usr/bin/find</text:span></text:span><text:span text:style-name="T4"> </text:span>tenía este permiso especial.</text:p>
        </text:list-item>
      </text:list>
      <text:p text:style-name="Text_20_body"><draw:frame draw:style-name="fr1" draw:name="Imagen35" text:anchor-type="char" svg:x="-0.194cm" svg:y="-0.291cm" svg:width="14.848cm" svg:height="10.149cm" draw:z-index="8"><draw:image xlink:href="Pictures/10000001000002B4000001D93F104B10.png" xlink:type="simple" xlink:show="embed" xlink:actuate="onLoad" draw:mime-type="image/png"/></draw:frame></text:p>
      <text:p text:style-name="Text_20_body"/>
      <text:p text:style-name="Text_20_body"/>
      <text:p text:style-name="Text_20_body"/>
      <text:h text:style-name="P10" text:outline-level="3"><text:bookmark-start text:name="__RefHeading___Toc6044_912096607"/><text:soft-page-break/>5.2 El final a Root<text:bookmark-end text:name="__RefHeading___Toc6044_912096607"/></text:h>
      <text:p text:style-name="Text_20_body">Usamos una técnica para engañar al comando <text:span text:style-name="Source_20_Text"><text:span text:style-name="T4">find</text:span></text:span> y obligarlo a ejecutarnos una terminal con permisos máximos.</text:p>
      <text:list text:style-name="L8">
        <text:list-item>
          <text:p text:style-name="P24"><text:span text:style-name="T2">Comando:</text:span> <text:span text:style-name="Source_20_Text"><text:span text:style-name="T4">/usr/bin/find . -exec /bin/sh -p \; -quit</text:span></text:span></text:p>
        </text:list-item>
      </text:list>
      <text:p text:style-name="Text_20_body"><draw:frame draw:style-name="fr1" draw:name="Imagen36" text:anchor-type="char" svg:x="1cm" svg:y="-0.129cm" svg:width="15cm" svg:height="10.859cm" draw:z-index="9"><draw:image xlink:href="Pictures/100000010000029E000001E5B9C1061A.png" xlink:type="simple" xlink:show="embed" xlink:actuate="onLoad" draw:mime-type="image/png"/></draw:frame><draw:frame draw:style-name="fr6" draw:name="Imagen38" text:anchor-type="char" svg:x="1.7cm" svg:y="10.728cm" svg:width="13.548cm" svg:height="9.666cm" draw:z-index="10"><draw:image xlink:href="Pictures/100000010000069B0000032C4C1978CF.png" xlink:type="simple" xlink:show="embed" xlink:actuate="onLoad" draw:mime-type="image/png"/></draw:frame></text:p>
      <text:p text:style-name="Text_20_body"><text:soft-page-break/><text:span text:style-name="T10">Al escribir </text:span><text:span text:style-name="Source_20_Text"><text:span text:style-name="T11">whoami</text:span></text:span><text:span text:style-name="T10">, el sistema respondió </text:span><text:span text:style-name="T12">root</text:span><text:span text:style-name="T10">. Habíamos tomado el control total de la </text:span><text:span text:style-name="T13">ColddBox</text:span><text:span text:style-name="T10">.</text:span></text:p>
      <text:p text:style-name="P25">Buscamos dentro de<text:span text:style-name="T5"> c0ldd </text:span>las flags respondiendo como <text:span text:style-name="T5">user.txt y root.txt</text:span></text:p>
      <text:h text:style-name="P9" text:outline-level="2"/>
      <text:h text:style-name="P9" text:outline-level="2"><text:bookmark-start text:name="__RefHeading___Toc6046_912096607"/>6. Conclusión y Recomendaciones<text:bookmark-end text:name="__RefHeading___Toc6046_912096607"/></text:h>
      <text:list text:style-name="L9">
        <text:list-item>
          <text:p text:style-name="P26"><text:span text:style-name="T2">No dejar notas en directorios web:</text:span> Cualquier información sobre usuarios es una ayuda para el atacante.</text:p>
        </text:list-item>
        <text:list-item>
          <text:p text:style-name="P26"><text:span text:style-name="T2">Mantener contraseñas robustas:</text:span> El uso de diccionarios permitió entrar en segundos.</text:p>
        </text:list-item>
        <text:list-item>
          <text:p text:style-name="P26"><text:span text:style-name="T2">Principio de Menor Privilegio:</text:span><text:span text:style-name="T10"> Comandos como </text:span><text:span text:style-name="Source_20_Text"><text:span text:style-name="T13">find</text:span></text:span><text:span text:style-name="T10"> </text:span><text:span text:style-name="T13">nunca deberían tener permisos</text:span><text:span text:style-name="T10"> </text:span><text:span text:style-name="T13">SUID</text:span><text:span text:style-name="T10"> </text:span><text:span text:style-name="T13">a</text:span><text:span text:style-name="T13">ctivos</text:span>, ya que son un camino directo para que un atacante se convierta en administrador.</text:p>
        </text:list-item>
      </text:list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draw:gradient draw:name="Mahogany" draw:style="square" draw:cx="50%" draw:cy="50%" draw:start-color="#000000" draw:end-color="#8d281e" draw:start-intensity="100%" draw:end-intensity="100%" draw:angle="45deg" draw:border="0%">
      <loext:gradient-stop svg:offset="0" loext:color-type="rgb" loext:color-value="#000000"/>
      <loext:gradient-stop svg:offset="1" loext:color-type="rgb" loext:color-value="#8d281e"/>
    </draw:gradient>
    <draw:gradient draw:name="Neon_20_Light" draw:display-name="Neon Light" draw:style="ellipsoid" draw:cx="50%" draw:cy="50%" draw:start-color="#127622" draw:end-color="#ffffff" draw:start-intensity="100%" draw:end-intensity="100%" draw:angle="0deg" draw:border="15%">
      <loext:gradient-stop svg:offset="0" loext:color-type="rgb" loext:color-value="#127622"/>
      <loext:gradient-stop svg:offset="1" loext:color-type="rgb" loext:color-value="#ffffff"/>
    </draw:gradient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loext:graphic-properties draw:fill="gradient" draw:fill-gradient-name="Neon_20_Light" draw:gradient-step-count="0"/>
      <style:paragraph-properties fo:margin-left="0cm" fo:text-indent="0cm" style:auto-text-indent="false" fo:background-color="#89bb91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loext:graphic-properties draw:fill="gradient" draw:fill-gradient-name="Neon_20_Light" draw:gradient-step-count="0"/>
      <style:paragraph-properties fo:margin-left="0.499cm" fo:text-indent="0cm" style:auto-text-indent="false" fo:background-color="#89bb91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loext:graphic-properties draw:fill="gradient" draw:fill-gradient-name="Neon_20_Light" draw:gradient-step-count="0"/>
      <style:paragraph-properties fo:margin-left="1cm" fo:text-indent="0cm" style:auto-text-indent="false" fo:background-color="#89bb91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loext:graphic-properties draw:fill="gradient" draw:fill-gradient-name="Mahogany" draw:gradient-step-count="0"/>
      <style:paragraph-properties fo:background-color="#47140f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left" style:justify-single-word="false"/>
      <style:text-properties fo:font-size="20pt" style:font-size-asian="20pt" style:font-size-complex="20pt"/>
    </style:style>
    <style:style style:name="MP2" style:family="paragraph" style:parent-style-name="Footer">
      <style:paragraph-properties fo:text-align="right" style:justify-single-word="false"/>
    </style:style>
    <style:style style:name="MT1" style:family="text">
      <style:text-properties officeooo:rsid="0007aeae"/>
    </style:style>
    <style:style style:name="MT2" style:family="text">
      <style:text-properties fo:font-size="20pt" style:font-size-asian="20pt" style:font-size-complex="20pt"/>
    </style:style>
    <style:style style:name="MT3" style:family="text">
      <style:text-properties fo:font-size="20pt" officeooo:rsid="0007aeae" style:font-size-asian="20pt" style:font-size-complex="20pt"/>
    </style:style>
    <style:page-layout style:name="Mpm1">
      <style:page-layout-properties fo:page-width="21.001cm" fo:page-height="29.7cm" style:num-format="1st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Estilo de página predeterminado1"/><text:page-number text:select-page="current">5.º</text:page-number><text:s/>/ <text:page-count>9.º</text:page-count><text:bookmark-end text:name="PageNumWizard_FOOTER_Estilo de página predeterminado1"/><text:s text:c="71"/><text:span text:style-name="MT1">Pituss2</text:span></text:p>
      </style:footer>
      <style:footer-left>
        <text:p text:style-name="MP2"><text:bookmark-start text:name="PageNumWizard_FOOTER_Estilo de página predeterminado2"/><text:span text:style-name="MT2"><text:page-number text:select-page="current">6.º</text:page-number></text:span><text:span text:style-name="MT2"><text:s/>/ </text:span><text:span text:style-name="MT2"><text:page-count>9.º</text:page-count></text:span><text:bookmark-end text:name="PageNumWizard_FOOTER_Estilo de página predeterminado2"/><text:span text:style-name="MT2"><text:s text:c="70"/></text:span><text:span text:style-name="MT3">Pituss2</text:span><text:span text:style-name="MT2"> <text:s text:c="2"/></text:span><text:s text:c="4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2T14:30:09.384413500</meta:creation-date>
    <dc:date>2026-04-22T15:38:36.826842100</dc:date>
    <meta:editing-duration>PT4M49S</meta:editing-duration>
    <meta:editing-cycles>1</meta:editing-cycles>
    <meta:document-statistic meta:table-count="0" meta:image-count="10" meta:object-count="0" meta:page-count="9" meta:paragraph-count="71" meta:word-count="749" meta:character-count="4933" meta:non-whitespace-character-count="4130"/>
    <meta:generator>LibreOffice/26.2.2.2$Windows_X86_64 LibreOffice_project/1f77d10d6938fd34972958f64b2bcfa54f8b1ba5</meta:generator>
  </office:meta>
</office:document-meta>
</file>